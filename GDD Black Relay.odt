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NTITÉ<text:line-break/><text:line-break/>Nom : Black Relay · Tagline : DEFEND // RESIST // SURVIVE<text:line-break/>Genre : Tower Defense inspiré Arknights × Punishing Gray Raven<text:line-break/>Langage : C++<text:line-break/><text:line-break/><text:line-break/>CONCEPT<text:line-break/><text:line-break/>Ennemis = robots corrompus (virus/défaillance système)<text:line-break/>Les ennemis ne s'arrêtent PAS sur les tours, combat au contact mais continuent d'avancer<text:line-break/>Les deux camps ont des PV<text:line-break/>Objectif : protéger le Black Relay (noyau central)<text:line-break/><text:line-break/><text:line-break/>GAMEPLAY<text:line-break/><text:line-break/>Placement libre et irréversible<text:line-break/>Nombre de tours limité (attendre la mort pour replacer)<text:line-break/>Vagues 1-2-3 : unités basiques gratuites<text:line-break/>Vague 4+ : tout coûte des Relay Shards<text:line-break/>Unité spéciale Black Relay : invocable une seule fois, JOKER du joueur ⚠️ — fonctionnalité "placement au milieu du chemin" non implémentée par manque de temps<text:line-break/><text:line-break/><text:line-break/>13 CLASSES D'UNITÉS<text:line-break/><text:line-break/>Vanguard · Guardian · Sniper · Assault · Heavy Gunner · Medic · Tactician · Elementalist · Infiltrator · Engineer · Exorcist · Berserker · Sentinel<text:line-break/><text:line-break/><text:line-break/>STATS UNITÉS<text:line-break/><text:line-break/>Vanguard : 300 PV · 50 Shards · 25 DPS · courte · Up1 +PV 75 · Up2 Blocage 120<text:line-break/>Guardian : 600 PV · 80 Shards · 15 DPS · courte · Up1 +PV 100 · Up2 Armure 150<text:line-break/>Sniper : 150 PV · 70 Shards · 60 DPS · très longue · Up1 +Dégâts 90 · Up2 Perforant 140<text:line-break/>Assault : 250 PV · 60 Shards · 40 DPS · moyenne · Up1 +DPS 80 · Up2 Double attaque 130<text:line-break/>Heavy Gunner : 350 PV · 100 Shards · 50 AoE · moyenne · Up1 +AoE 110 · Up2 Rafale 160<text:line-break/>Medic : 200 PV · 65 Shards · 0 DPS · moyenne · Up1 Soin+10/s 85 · Up2 Soin zone 135<text:line-break/>Tactician : 200 PV · 75 Shards · 20 DPS · moyenne · Up1 Debuff vitesse -20% 95 · Up2 Debuff dégâts -15% 145<text:line-break/>Elementalist : 180 PV · 85 Shards · 45 AoE · longue · Up1 +Élémental 105 · Up2 Explosion 155<text:line-break/>Infiltrator : 150 PV · 55 Shards · 35 DPS · courte · Up1 +Vitesse 75 · Up2 Invisibilité 125<text:line-break/>Engineer : 250 PV · 90 Shards · 30 DPS · moyenne · Up1 Tourelle 115 · Up2 Double tourelle 165<text:line-break/>Exorcist : 200 PV · 95 Shards · 35 DPS · longue · Up1 Supprime buffs 120 · Up2 Annule répa Overseer 170<text:line-break/>Berserker : 200 PV · 80 Shards · 70 DPS · courte · Up1 +Dégâts si PV&lt;50% 100 · Up2 Rage 150<text:line-break/>Sentinel : 500 PV · 110 Shards · 20 DPS · courte · Up1 Bouclier 130 · Up2 Réflexion 10% 180<text:line-break/>Black Relay : 1500 PV · 500 Shards · une seule fois · Mêlée 100 DPS / Ranged 70 DPS · switch auto<text:line-break/><text:line-break/><text:line-break/><text:soft-page-break/>ENNEMIS<text:line-break/><text:line-break/>Scout : 80 PV · Vitesse 3 · 8 DPS · drop 10 Shards · +15%/vague<text:line-break/>Infected : 200 PV · Vitesse 2 · 15 DPS · drop 20 Shards · +20%/vague<text:line-break/>Destroyer : 600 PV · Vitesse 1 · 35 DPS · drop 50 Shards · +25%/vague<text:line-break/>Blighter : 300 PV · Vitesse 2 · 20 AoE · drop 35 Shards · +20%/vague<text:line-break/>Overseer : 250 PV · Vitesse 2 · 10 DPS · drop 45 Shards · +15%/vague<text:line-break/>Boss : à définir<text:line-break/><text:line-break/><text:line-break/>ÉCONOMIE<text:line-break/><text:line-break/>Relay Shards : combat, drops ennemis, déploiement + upgrades<text:line-break/>Black Resonance : méta — gacha non implémenté<text:line-break/><text:line-break/><text:line-break/>MENUS (maquette validée)<text:line-break/><text:line-break/>Continuer · Nouvelle Partie · Opérateurs · Arsenal · Recherche · Dossier · Paramètres · Crédits · Quitter<text:line-break/>Opérateurs, Arsenal, Recherche (gacha) : concept uniquement, non implémenté<text:line-break/><text:line-break/><text:line-break/>ARCHITECTURE C++<text:line-break/><text:line-break/>MVC + Observer + Factory<text:line-break/>Placeholders à renommer : Goblin→Scout, Troll→Destroyer, Archer/Cannon/Magic→classes roster<text:line-break/><text:line-break/><text:line-break/>MAP<text:line-break/><text:line-break/>Chemin en escalier (3 paliers, virages 90°)<text:line-break/>Sens et graphisme : à envoyer<text:line-break/><text:line-break/><text:line-break/>À DÉFINIR / RECEVOIR<text:line-break/><text:line-break/>Boss<text:line-break/>Système de difficulté<text:line-break/>Map (détails)<text:line-break/>Gacha (concept uniquement, non implémenté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08T10:02:29.13</meta:creation-date>
    <meta:document-statistic meta:table-count="0" meta:image-count="0" meta:object-count="0" meta:page-count="2" meta:paragraph-count="1" meta:word-count="621" meta:character-count="3202"/>
    <dc:date>2026-06-08T10:02:47.69</dc:date>
    <meta:editing-duration>PT18S</meta:editing-duration>
    <meta:editing-cycles>1</meta:editing-cycles>
    <meta:generator>OpenOffice/4.1.16$Win32 OpenOffice.org_project/4116m3$Build-9816</meta:generator>
  </office:meta>
</office:document-meta>
</file>